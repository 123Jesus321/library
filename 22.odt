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000000" style:font-name="Times New Roman" fo:font-size="20pt" style:font-size-asian="20pt" style:font-size-complex="20pt"/>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style:font-name="Times New Roman" fo:font-size="20pt" fo:language="ru" fo:country="RU" fo:font-weight="bold" officeooo:rsid="000b5c47" officeooo:paragraph-rsid="000b5c47" style:font-size-asian="20pt" style:font-weight-asian="bold" style:font-size-complex="20pt" style:font-weight-complex="bold"/>
    </style:style>
    <style:style style:name="T1" style:family="text">
      <style:text-properties fo:font-variant="normal" fo:text-transform="none" fo:color="#e1e3e6" style:font-name="apple-system" fo:font-size="9.75pt" fo:letter-spacing="normal" fo:font-style="normal" fo:font-weight="normal"/>
    </style:style>
    <style:style style:name="T2" style:family="text">
      <style:text-properties fo:font-variant="normal" fo:text-transform="none" fo:color="#e1e3e6" style:font-name="apple-system" fo:letter-spacing="normal" fo:font-style="normal" fo:font-weight="normal"/>
    </style:style>
    <style:style style:name="T3" style:family="text">
      <style:text-properties fo:font-variant="normal" fo:text-transform="none" fo:color="#e1e3e6" fo:letter-spacing="normal" fo:font-style="normal" fo:font-weight="normal"/>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text:p>
      <text:p text:style-name="P2"><text:span text:style-name="T4">Внимание! В рассказе присутствует упоминание смерти родных и близких. Приятного чтения!</text:span></text:p>
      <text:p text:style-name="P1"><text:span text:style-name="T5"/></text:p>
      <text:p text:style-name="P1"><text:span text:style-name="T5"/></text:p>
      <text:p text:style-name="P1"><text:span text:style-name="T5"/></text:p>
      <text:p text:style-name="P1"><text:span text:style-name="T5"/></text:p>
      <text:p text:style-name="P1"><text:span text:style-name="T5">Спину щекочет изумрудная трава, в воздухе витает запах свежести и полевых цветов. Солнце рваными лучами падает на поляну. Рядом летит важный шмель, ворчит, но продолжает путь до следующего цветка. Недалеко легко вспорхнула оранжевая бабочка, каких всегда мечтали поймать дети. Я не буду её ловить. Я уже не ребёнок.</text:span><text:line-break/><text:line-break/><text:span text:style-name="T5">И какое-то странное чувство теплится в сердце. Я всё не могу понять что это. Сижу и пялюсь на всё это. Потому что красиво, потому что это природа. Я же её люблю.</text:span><text:line-break/><text:line-break/><text:span text:style-name="T5">Солнце греет оголённые плечи, но рукам всё ещё холодно. Или не рукам. Озорной жук резво поднимается по моим пальцам, опущенным в траву, а я с напряжением, но приподнимаю руку, чтобы разглядеть его. Не божья коровка, но похож. Я не помню, как они называются. Но красивый.</text:span><text:line-break/><text:line-break/><text:span text:style-name="T5">Он своими усиками двигает, изучает, и я его тоже. Тоненькими лапками перебирает, будто подкрадывается, а потом принюхивается. На алом брюшке красуются черные точечки, но не коровка же </text:span><text:soft-page-break/><text:span text:style-name="T5">это!</text:span><text:line-break/><text:line-break/><text:span text:style-name="T5">Я подношу его ближе к лицу. Странный он, жук этот. Как будто другой, непохожий. И я тоже. Я смахиваю жука с руки, и он падает куда-то в траву. Отвожу взгляд и смотрю на яркое солнце, но не выдерживаю и минуты. Закрываю глаза, а перед ними фигуры непонятные плывут. Открываю.</text:span><text:line-break/><text:line-break/><text:span text:style-name="T5">Приходится подняться — хватит уже. Придерживаюсь рукой за приятно шершавую кору дерева, встаю. Ноги с непривычки пошатываются, но я держусь, оглядываюсь на цветы и не могу выдавить улыбку. А незачем ведь, нет никого.</text:span><text:line-break/><text:line-break/><text:span text:style-name="T5">Делаю пару неуверенных шагов, останавливаюсь, моргаю, вглядываюсь в ромашку. Она приглядывается ко мне настороженно. Я не выдерживаю её взгляда, срываю цветок. Иду дальше.</text:span><text:line-break/><text:line-break/><text:span text:style-name="T5">Срываю ещё один. Красивый. А руки сами собой снова тянутся. И вот, через пару секунд у меня есть целая охапка. Вдыхаю их разрозненный, но всё ещё приятный запах. И кладу на землю, будто на могилу. Я уже не ребёнок ведь.</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26T13:07:25.162000000</meta:creation-date>
    <dc:date>2026-04-26T13:17:27.306000000</dc:date>
    <meta:editing-duration>PT10M3S</meta:editing-duration>
    <meta:editing-cycles>2</meta:editing-cycles>
    <meta:generator>Trio_Office/6.2.8.2$Windows_x86 LibreOffice_project/</meta:generator>
    <meta:document-statistic meta:table-count="0" meta:image-count="0" meta:object-count="0" meta:page-count="2" meta:paragraph-count="2" meta:word-count="307" meta:character-count="1916" meta:non-whitespace-character-count="1602"/>
  </office:meta>
</office:document-meta>
</file>