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arial, Tahoma, verdana,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variant="normal" fo:text-transform="none" fo:color="#000000" style:font-name="Times New Roman" fo:font-size="20pt" style:font-size-asian="20pt" style:font-size-complex="20pt" loext:padding="0cm" loext:border="none"/>
    </style:style>
    <style:style style:name="P2" style:family="paragraph" style:parent-style-name="Standard">
      <style:text-properties fo:color="#000000" style:font-name="Times New Roman" fo:font-size="20pt" style:font-size-asian="20pt" style:font-size-complex="20pt"/>
    </style:style>
    <style:style style:name="P3" style:family="paragraph" style:parent-style-name="Standard">
      <style:paragraph-properties fo:margin-left="0cm" fo:margin-right="0cm" fo:margin-top="0cm" fo:margin-bottom="0cm" loext:contextual-spacing="false" style:line-height-at-least="0.476cm" fo:text-indent="0cm" style:auto-text-indent="false"/>
      <style:text-properties fo:font-variant="normal" fo:text-transform="none" fo:color="#000000" style:font-name="Times New Roman" fo:font-size="20pt" fo:font-style="normal" fo:font-weight="normal" style:font-size-asian="20pt" style:font-size-complex="20pt" loext:padding="0cm" loext:border="none"/>
    </style:style>
    <style:style style:name="T1" style:family="text">
      <style:text-properties fo:font-style="normal" fo:font-weight="normal"/>
    </style:style>
    <style:style style:name="T2" style:family="text">
      <style:text-properties style:font-name="apple-system" fo:font-size="9.75pt" fo:font-style="normal" fo:font-weight="normal"/>
    </style:style>
    <style:style style:name="T3" style:family="text">
      <style:text-properties fo:font-size="9.75pt" fo:font-style="normal" fo:font-weight="normal"/>
    </style:style>
    <style:style style:name="Sect1" style:family="section">
      <style:section-properties fo:background-color="transparent" fo:margin-left="0cm" fo:margin-right="0cm"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pan text:style-name="T1">И на погоны! <text:line-break/><text:line-break/>— Хм, видимо, я выбрал неверную тактику, – задумчиво говорит Флинс, рассматривая свои карты. Но в глазах ярким синим пламенем горят искорки азарта и лёгкой насмешки.<text:line-break/><text:line-break/>Иллуги фыркает и закатывает глаза, после чего рассыпается в смехе. Это уже не первая партия за этот вечер, и не первый допитый бокал вина. Иллуга и не заметил, как на землю опустилась ночь, а с ней и прохлада вблизи моря. Он вообще в последнее время теряет внимательность. Он даже не заметил, как запах сырости и пыли маяка у кладбища стал привычным, а вечера за картами и разговорами — приятной обыденностью.<text:line-break/><text:line-break/>Не понятно как, но это кладбище будто потеряло свою мрачную атмосферу, но лёгкая таинственность осталась, как и интимность момента. Иллуги уже успел обойти каждую могилу здесь, на некоторые, имена на которых он узнал из древних отчётов в Пирамиде, даже клал цветы из уважения к их подвигам. Правда одна, самая древняя здесь, вызывала вопросы, но он потом как-нибудь спросит у Флинса подробнее.<text:line-break/><text:line-break/>— Может выйдем подышать? – Иллуга подпёр голову рукой и задумчиво уставился в глаза собеседника. Юноша тянет руку к бокалу, но вспоминает, что вино в нём кончилось, так что быстро одёргивает.<text:line-break/><text:line-break/></text:span><text:soft-page-break/><text:span text:style-name="T1">— Устал? – глаза Флинса передают что-то, но помутнившийся мозг не может понять что именно, так что Иллуга просто отрицательно мотает головой.<text:line-break/><text:line-break/>— Просто голова уже плывёт – проветриться надо.<text:line-break/><text:line-break/>И Кирилл послушно встаёт со скрипучего стула и проходит к двери, но останавливается дожидаясь Иллуги. Дверь неохотно открывается и морозный зимний воздух бьёт по щекам, заставляя немного вздрогнуть. <text:line-break/><text:line-break/>Они уже привычным путём поднимаются на старый маяк и устраиваются на краю. Глаза сразу же цепляются за луну рождающую бледный свет, за морские волны, которые мирно и спокойно сменяют друг друга и тихо шуршат.<text:line-break/><text:line-break/>Активность бездны в последние дни сильно возросла на севере, завтра придётся отправиться в экспедицию со своим отрядом. У ратников не хватает рук на фоне последних потрясений, и на плечи командира взвалилась целая кипа проблем с продовольствием, потерями и оружием. И Иллуга не жалуется, не смеет. Он знает, что выдержит, он силён, он прошёл множество тренировок. Даже сама жизнь не раз подбрасывала ему испытания, но он стойко их прошёл, и это тоже пройдёт. Но это всё завтра.<text:line-break/><text:line-break/>А сейчас Иллуга просто поворачивает голову и встречается взглядом с пляшущим огнём. В свете луны </text:span><text:soft-page-break/><text:span text:style-name="T1">кожа Флинса кажется ещё более белой, будто редкий снег в Нод-Крае самой холодной зимой. Спину прошибает стайка мурашек. Он ещё не до конца разобрался кто Кирилл такой, что за секрет он скрывает, но может быть с этим и правда стоит повременить. <text:line-break/><text:line-break/>— Я вернусь, – твёрдо и уверенно говорит Иллуга, но в последнюю секунду голос дрожит.<text:line-break/><text:line-break/>— Вернёшься, – Флинс кивает, ни секунды не сомневаясь в этом, его глаза снова игриво сверкают, – и я точно тебя обыграю.<text:line-break/><text:line-break/>Иллуга фыркает и смеётся.<text:line-break/><text:line-break/>Только осторожно, тут могут быть триггеры<text:line-break/><text:line-break/>Первая мысль была — почему я проснулся?<text:line-break/><text:line-break/>Вторая — какого хера так ломит тело?<text:line-break/><text:line-break/>И на оба этих вопроса у меня вроде как был ответ.<text:line-break/><text:line-break/>Сквозь ноющую боль и сон я открыл глаза. Лучше бы и не открывал. Перед взором моим предстал обшарпанный потолок, покрытый пылью и грязью.<text:line-break/><text:line-break/>Тело верещало нещадно. Боль пронизывала его, начиная от кончиков пальцев, заканчивая каждым органом и конечностью. Она вилась словно какое-то странное растение, медленно, но верно становилась </text:span><text:soft-page-break/><text:span text:style-name="T1">частью моего тела, новым чувством. Она двигалась ядовитой змеёй по венам, заставляя хмурится.<text:line-break/><text:line-break/>"Чёрт"<text:line-break/><text:line-break/>И снова новый день. А может ночь? Сейчас сложно понять.<text:line-break/><text:line-break/>Я однозначно уснул в ванной, так что боль в теле этим отлично объяснялась.<text:line-break/><text:line-break/>Я закрыл глаза вновь. Ну почему? Почему мне приходится жить? Почему приходится натягивать улыбку? Когда вокруг вновь появилась темнота, мне стало легче. Я медленно адаптировался к ощущениям и придвинул колени к телу, стараясь таким образом их размять.<text:line-break/><text:line-break/>Что ж, теперь можно открыть глаза. Всё тот же старый потолок.<text:line-break/><text:line-break/>Почему во сне мне было так хорошо и легко? Мне казалось, что все эти пробл</text:span></text:p>
      <text:section text:style-name="Sect1" text:name=":re:preview">
        <text:p text:style-name="P3">емы позади, что я снова в детстве. Что я у бабушки в деревне. Она приготовила мне борщ, а я отказывался, ведь был не голоден. Бабушка пригрозила мне, что тогда не даст мне сладкого, на что я, как миленький, уселся за стол и, стараясь не концентрироваться на вкусе, стал поедать суп. А ведь он был вкусным.<text:line-break/><text:line-break/>Мой живот заурчал, выбивая из столь приятных <text:soft-page-break/>воспоминаний.<text:line-break/><text:line-break/>Я скрутился от этой тугой боли, пытаясь исчезнуть. Не помогло. Пришлось вставать.<text:line-break/><text:line-break/>По позвоночнику прошлась яркая искра, но я, уже не скривившись, стерпел. Чуть не споткнулся об порог, еле поднимая ноги в до абсурдности смешных носках. Открыв дверь, невольно сощурился от попавшего в глаза солнечного света. Всё же утро.<text:line-break/><text:line-break/>Что ж, наверное всё не так плохо.<text:line-break/><text:line-break/>Ноги сами привели меня к незаправленной кровати, и я упал на неё лицом в подушку с мыслью продолжить спать.<text:line-break/><text:line-break/>Бабушка встретила меня удивлённым, даже несколько испуганным вздохом, когда я принёс ей живую лягушку, которую совсем недавно поймал.<text:line-break/><text:line-break/>— Смотли! Какая смешная! – с улыбкой произнёс я, стараясь поднять земноводное повыше.<text:line-break/><text:line-break/>— Ой! Не пугай меня так и отпусти бедное животное! – запричитала бабушка, на что я улыбнулся лишь шире.<text:line-break/><text:line-break/>— Холошо, бабушка!<text:line-break/><text:line-break/>Из лёгкой дрёмы меня выбил раздражающий звук телефона. Почему я его ещё не отключил? Ах, да. <text:soft-page-break/>Пришлось приложить много сил, чтобы лишь повернуть голову в сторону гаджета и найти его глазами. Неприятная трель звонка всё продолжала настырно играть, кто-то явно хочет поговорить со мной. И это может быть лишь один человек, больше некому.<text:line-break/><text:line-break/>Знакомо подписанный контракт, не переставая, продолжал попытки дозвониться, в то время как я с неким замиранием сердца глядел на имя, изображенное на экране.<text:line-break/><text:line-break/>Пальцы на автомате потянулись за гаджетом, но на секунду дрогнули в нерешительности. Нет. Я обязан ответить.<text:line-break/><text:line-break/>— Опять проспал? – с беспокойством спрашивает голос из телефона.<text:line-break/><text:line-break/>Как только я открываю рот, то из него вырываются только хриплые спросонья слова:<text:line-break/><text:line-break/>— Что-то вроде того...<text:line-break/><text:line-break/>На секунду повисает пауза, а в голове звенящая тишина, давящая на сосуды.<text:line-break/><text:line-break/>Я неуверенно прикусил губу в ожидании продолжения. Взгляд сам собой упал на стену с несколькими плакатами. Вот обшарпанный с броским, вьевшимся на подкорку мозга и донельзя любимым «Nirvana». А вот этот просто с непонятными фигурами и надписью <text:soft-page-break/>«Пора жить». Иронично. Его мне занесла подруга, когда решила, что стены слишком уж пустые. О, а тот-<text:line-break/><text:line-break/>— Как ты? – тихо, с еле скользящим в голосе страхом.<text:line-break/><text:line-break/>Нужно пару секунд проморгаться, чтобы банально осознать вопрос. А что на него ответить? Он и сам не понимает? Что с ним?<text:line-break/><text:line-break/>Поглащающая пустота? Возможно.<text:line-break/><text:line-break/>Тянущая боль в сердце и костях? Вероятно.<text:line-break/><text:line-break/>Безмолвный крик от отчаянья? Пожалуй.<text:line-break/><text:line-break/>— В целом? Неплохо, – с нервной усмешкой отвечаю.<text:line-break/><text:line-break/>— ... <text:line-break/><text:line-break/>И вновь тишина. <text:line-break/><text:line-break/>Приходится положить телефон экраном вверх на подушку, глядя на цифры, рассказывающие сколько идёт звонок. 04:21. Уже 22.<text:line-break/><text:line-break/>Я тихо дышу, но иногда забываю выдыхать. В такие моменты создаётся ощущение, что я уже не существую. Не уверен, что я хотел бы этого. По крайней мере сейчас.<text:line-break/><text:line-break/>Отчаянное "ладно" из телефона, будто ставит печать на <text:soft-page-break/>моём приговоре, подписывает кровавыми чернилами постыдное "неудачник".<text:line-break/><text:line-break/>Но голос возвращается вновь.<text:line-break/><text:line-break/>— Жду тебя в 15 часов. Куплю кофе и что-нибудь съестное. Ты же наверное не ел.<text:line-break/><text:line-break/>А после звонок завершается, и экран темнеет. Хотя, наверное там навсегда останутся 50 оттенков всех серых эмоций.<text:line-break/><text:line-break/>Я чуть ли не проглатываю собственный язык. Не успеваю сказать ничего. Вот так всегда. В одну руку дают стаканчик кофе, в другую всовывают булку с грушевым джемом, а после обнимают. И жизнь тогда как будто бы не такая вялая, и на лице образовывается аномалия под кодовым именем "улыбка". Но это потом.<text:line-break/><text:line-break/>Я не замечаю, как уже некоторое время пялюсь в пустой экран. А он пялится на меня.<text:line-break/><text:line-break/>Наверное, фазу глубочайшего отчаяния после своих подобных провалов я уже пережил, ведь в сердце не осталось ничего. А из целого "ничего" ничего и получится. Глупо, да?<text:line-break/><text:line-break/>В квартире раздаётся скрип пола, когда встаёшь в определенном месте.</text:p>
      </text:section>
      <text:section text:style-name="Sect1" text:name=":rf:preview">
        <text:p text:style-name="P3">Даже в носках.<text:line-break/><text:line-break/><text:soft-page-break/>Тяжесть и ломка в конечностях теперь уже не настолько заметны, чтобы забивать всё черепное пространство, но всё равно ощутимы, так что необходимо найти обезбаливающее.<text:line-break/><text:line-break/>В аптечке находятся последние 2 таблетки, так что я беру одну из них, отмечая в голове, что нужно будет купить ещё. Но я уже заранее знаю, что забуду об этом.<text:line-break/><text:line-break/>Кухня встречает меня кучей немытых кружек на столе и тарелками в мойке. Кажется, я собирался мыть посуду, но до той, что на столе, я так и не добрался. В следующий раз. В следующей жизни.<text:line-break/><text:line-break/>В бутылке оказывается запечатанная вода, так что я запиваю таблетку для большего эффекта. Так ведь будет лучше, верно?<text:line-break/><text:line-break/>— А я говорила, что нельзя гулять под дождём! Даже если ты очень хочешь достать собственного червяка, – сказала бабушка, наливая горячее молоко и добавляя в него растопленное масло и мёд. — Держи, вот, от горла. Сейчас найдём тебе таблетки от температуры.<text:line-break/><text:line-break/>— Спасибо, бабушка! – улыбка была наполовину беззубая, так что, вероятно, я выглядел очень комично.<text:line-break/><text:line-break/>Я сделал несколько пробных глотков, оценивая вкус. Понравилось.<text:line-break/><text:line-break/>Я подавился.<text:line-break/><text:soft-page-break/><text:line-break/>— Бля-кхе...<text:line-break/><text:line-break/>Я откашливаюсь и вновь закрываю глаза, но попасть в воспоминания больше не удаётся. Голова всё ещё трещит по швам, но скоро пройдет. Где-то через пол часа, если память не изменяет. Хотя я ей больше не верю.<text:line-break/><text:line-break/>В шкафу у меня довольно пусто и грустно. Пара рубашек, футболки, три пары штанов, носки и трусы. Эта вроде не грязная.<text:line-break/><text:line-break/>Чтобы удостовериться подношу рубашку к носу. Точно чистая.<text:line-break/><text:line-break/>В ванную возвращаться страшно, там я боюсь снова уснуть, но на этот раз навсегда. Там есть зеркало и раковина, старая и потрепаная жизнью зубная щетка.<text:line-break/><text:line-break/>Дверной скрип. Я на себя не смотрю, не хочу. Знаю, что увижу, но всё равно боюсь. Прилагаю усилия, чтобы выдавить порцию пасты на щётку и случайно закусываю губу от усердия. Взглядом сверлю странное пятно на плитке, когда наконец засовываю щетину за щеку.<text:line-break/><text:line-break/>И давно тут это пятно? Что оно видело? А помнит вчерашний день? Я вот не помню. А оно, наверное, помнит.<text:line-break/><text:line-break/><text:soft-page-break/>Когда я почувствовал металлический привкус во рту, понял, что пора заканчивать водные процедуры.<text:line-break/><text:line-break/>Опять скрипит пол. Раздражает. <text:line-break/><text:line-break/>Когда я выходил из квартиры, в памяти чётко отложились яркие граффити на старых и грязных стенах, с которых кусочками отваливается краска. Я не удержался, ногтем подковырнул и отодрал прямоугольничек, после чего запихнув в его карман.<text:line-break/><text:line-break/>Под ногами чавкает снежная масса из, собственно, неокрепшего снега и грязи. Всё это смешалось и образовало такую неприятную консистенцию. Я смотрю под ноги, как замечаю обертку от шоколадного батончика, который я когда-то любил. Сейчас я не ем сладкое.<text:line-break/><text:line-break/>Мимо меня пробегает маленькая собачка на поводке и лает. Она полна сил. За ней еле поспевая идёт её, видимо, хозяйка. В ушах у неё оказываются наушники.<text:line-break/><text:line-break/>Интересно, что за музыку она слушает? Рок или поп?<text:line-break/><text:line-break/>Я давно не слушал музыку. Хотя нет, если музыкой называть крики соседей за стенкой, то очень даже слушал. Регулярно по субботам и четвергам. Я никогда не мог расслышать, о чём они кричат. Но каждый такой раз закрываю уши и зажмуриваюсь. Тогда слышу только свои мысли. Я не люблю свои мысли, но если выбирать меж двух зол, я выберу их.<text:line-break/><text:soft-page-break/><text:line-break/>— Молодой человек! Куда вы идёте?! – недовольный женский голос.<text:line-break/><text:line-break/>Кто-то хватает меня за рукав куртки и оттаскивает назад.<text:line-break/><text:line-break/>Я смотрю прямо и передо мной на высокой скорости проносится машина, пачкая грязью мои штаны.<text:line-break/>Видимо, я случайно вышел на пешеходный переход на неположенном свете, а та женщина сейчас спасла меня от травм или даже гибели.<text:line-break/><text:line-break/>— Спасибо вам, – с нелепой улыбкой.<text:line-break/><text:line-break/>Та не отвечает, а я и не жду. Гляжу на светофор. Красное число 22 и проезжающие мимо машины.<text:line-break/><text:line-break/>Небо сегодня серое и унылое. Наверное как и я. Сегодня мы с небом схожи. Вот только летом оно красивое, голубое с редкими облаками, а на закате раскрашено алым и рыжим. А я так и остаюсь серым и унылым.<text:line-break/><text:line-break/>Цвет сменяется на зелёный и я прожолжаю шагать непонятно куда.<text:line-break/><text:line-break/>____<text:line-break/><text:line-break/>Еле нахожу в кармане пропуск в метро, там осталось денег на последнюю поездку</text:p>
      </text:section>
      <text:section text:style-name="Sect1" text:name=":rg:preview">
        <text:p text:style-name="P3"><text:soft-page-break/>. Надо будет пополнить баланс. Случайно замечаю подозрительный взгляд охранника. Я похож на вора или нелегала? Он так на всех что-ли смотрит?<text:line-break/><text:line-break/>Сейчас людей меньше и они не торопятся. А вот утром тут была бы целая огромная толпа бегущих. Больше всего я нелюблю находиться в подобной суете. У меня тогда появляется ощущение, что я где-нибудь ошибусь, поскользнусь.<text:line-break/><text:line-break/>Я спустился по лестнице, чуть не упав, и стою, смотрю на табличку со временем.<text:line-break/><text:line-break/>14:22:21. Уже 22.<text:line-break/><text:line-break/>Люди вокруг смотрят в телефоны. Кто-то разговаривает по звонку, громко ругаясь, а кто-то увлечённо тыкает пальцем по экрану. Мимо меня проходят несколько школьников. Прогульщики, видимо. А может тоже опоздали?<text:line-break/><text:line-break/>Или у них так рано уроки заканчиваются...<text:line-break/><text:line-break/>Каждый занят своим делом, а я один, будто сумасшедший, разглядываю всех, смотрю в глаза, ищу что-то.<text:line-break/><text:line-break/>Передо мной силуэт столь знакомый и родной, что на глаза накатываются тихие слёзы. Бабушка.<text:line-break/><text:line-break/>Я отрываю взгляд и смотрю на свои руки. Маленькие <text:soft-page-break/>ладошки. Оглядываюсь. Кругом поле, а на розовом цветке жужжит шмель. Небо теперь яркое, красивое. На нём нет облаков. Солнце в зените.<text:line-break/><text:line-break/>Мои губы растягиваются в глупой улыбке. Я рад.<text:line-break/><text:line-break/>Я бегу к бабушке, но момент кажется будто бы замедляется. Я топаю маленькими ножками, чуть ли не спотыкаясь и падая. Хватаю бабушку и крепко обнимаю. Утыкаюсь в неё, вдыхая запах детства, а она обнимает в ответ. Тоже улыбается. Я скучал.</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arial, Tahoma, verdana,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6-04-26T13:03:50.044000000</meta:creation-date>
    <dc:date>2026-04-26T13:05:08.566000000</dc:date>
    <meta:editing-duration>PT1M21S</meta:editing-duration>
    <meta:editing-cycles>1</meta:editing-cycles>
    <meta:document-statistic meta:table-count="0" meta:image-count="0" meta:object-count="0" meta:page-count="14" meta:paragraph-count="4" meta:word-count="2106" meta:character-count="13356" meta:non-whitespace-character-count="11106"/>
    <meta:generator>Trio_Office/6.2.8.2$Windows_x86 LibreOffice_project/</meta:generator>
  </office:meta>
</office:document-meta>
</file>